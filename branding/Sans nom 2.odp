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AB3A39BA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Bahnschrift SemiBold Condensed" svg:font-family="'Bahnschrift SemiBold Condense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25%" draw:gamma="100%" draw:red="0%" draw:green="0%" draw:blue="0%" fo:clip="rect(3.806cm, 11.008cm, 3.388cm, 11.004cm)" draw:image-opacity="100%" style:mirror="none" loext:decorative="false"/>
    </style:style>
    <style:style style:name="gr2" style:family="graphic" style:parent-style-name="standard" style:list-style-name="L1">
      <style:graphic-properties draw:textarea-vertical-align="middle" draw:auto-grow-height="false" fo:min-height="3.25cm" fo:min-width="19.5cm" loext:decorative="false"/>
      <style:paragraph-properties style:writing-mode="lr-tb"/>
    </style:style>
    <style:style style:name="gr3" style:family="graphic" style:parent-style-name="standard" style:list-style-name="L1">
      <style:graphic-properties draw:textarea-vertical-align="middle" draw:auto-grow-height="false" fo:min-height="3.75cm" fo:min-width="19.50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text-outline="true" style:font-name="Bahnschrift SemiBold Condensed" fo:text-shadow="1pt 1pt"/>
    </style:style>
    <style:style style:name="P3" style:family="paragraph">
      <loext:graphic-properties draw:fill-color="#ffffff"/>
    </style:style>
    <style:style style:name="T1" style:family="text">
      <style:text-properties style:text-outline="true" style:font-name="Bahnschrift SemiBold Condensed" fo:font-size="66pt" fo:text-shadow="1pt 1pt" style:font-size-asian="66pt" style:font-size-complex="66pt"/>
    </style:style>
    <style:style style:name="T2" style:family="text">
      <style:text-properties style:text-outline="true" style:font-name="Bahnschrift SemiBold Condensed" fo:font-size="88pt" fo:text-shadow="1pt 1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4cm" svg:height="14cm" svg:x="3cm" svg:y="3cm">
          <draw:image xlink:href="Pictures/1000000000000500000002D0AB3A39BA.jpg" xlink:type="simple" xlink:show="embed" xlink:actuate="onLoad" draw:mime-type="image/jpeg">
            <text:p/>
          </draw:image>
        </draw:frame>
        <draw:custom-shape draw:style-name="gr2" draw:text-style-name="P2" draw:layer="layout" svg:width="20cm" svg:height="3.5cm" svg:x="-0.001cm" svg:y="0cm">
          <text:p text:style-name="P2"><text:span text:style-name="T1">Operatio</text:span><text:span text:style-name="T1">n Royal </text:span><text:span text:style-name="T1">Allian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001cm" svg:height="4cm" svg:x="-0.001cm" svg:y="16cm">
          <text:p text:style-name="P2"><text:span text:style-name="T2">Dynamic Tasks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Bahnschrift SemiBold Condensed" svg:font-family="'Bahnschrift SemiBold Condense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3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07cm" fo:margin-bottom="0cm" fo:text-indent="0cm"/>
      <style:text-properties fo:font-size="35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8cm" fo:margin-bottom="0cm" fo:text-indent="0cm"/>
      <style:text-properties fo:font-size="30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53cm" fo:margin-bottom="0cm" fo:text-indent="0cm"/>
      <style:text-properties fo:font-size="25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5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17.999cm" svg:height="3.339cm" svg:x="1cm" svg:y="0.797cm" presentation:class="title" presentation:placeholder="true">
        <draw:text-box/>
      </draw:frame>
      <draw:frame presentation:style-name="Standard-outline1" draw:layer="backgroundobjects" svg:width="17.999cm" svg:height="11.599cm" svg:x="1cm" svg:y="4.679cm" presentation:class="outline" presentation:placeholder="true">
        <draw:text-box/>
      </draw:frame>
      <draw:frame presentation:style-name="Mpr1" draw:text-style-name="MP2" draw:layer="backgroundobjects" svg:width="4.659cm" svg:height="1.378cm" svg:x="1cm" svg:y="18.21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339cm" svg:height="1.378cm" svg:x="6.84cm" svg:y="18.21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659cm" svg:height="1.378cm" svg:x="14.34cm" svg:y="18.219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24T23:59:29.546818900</meta:creation-date>
    <dc:date>2026-05-25T00:15:55.633362600</dc:date>
    <meta:editing-duration>PT6M9S</meta:editing-duration>
    <meta:editing-cycles>1</meta:editing-cycles>
    <meta:document-statistic meta:object-count="26"/>
    <meta:generator>LibreOffice/26.2.3.2$Windows_X86_64 LibreOffice_project/70e089b17412e4cb7773e41413306b17a2328c34</meta:generator>
  </office:meta>
</office:document-meta>
</file>
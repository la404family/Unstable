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2EE8C953A6B.png" manifest:media-type="image/png"/>
  <manifest:file-entry manifest:full-path="Pictures/100000000000071C00000400140FE161.jpg" manifest:media-type="image/jpeg"/>
  <manifest:file-entry manifest:full-path="Pictures/10000000000004B000000320A85818AB.png" manifest:media-type="image/png"/>
  <manifest:file-entry manifest:full-path="Pictures/10000000000004B000000320244EB754.png" manifest:media-type="image/png"/>
  <manifest:file-entry manifest:full-path="Pictures/10000001000004B0000002D0E582C81E.png" manifest:media-type="image/png"/>
  <manifest:file-entry manifest:full-path="Pictures/10000000000004B000000320D08B4306.png" manifest:media-type="image/png"/>
  <manifest:file-entry manifest:full-path="Pictures/10000000000004B000000320DAC30275.png" manifest:media-type="image/png"/>
  <manifest:file-entry manifest:full-path="Pictures/10000000000004B0000003208301DD3D.png" manifest:media-type="image/png"/>
  <manifest:file-entry manifest:full-path="Pictures/10000000000004B0000002583439BACA.png" manifest:media-type="image/png"/>
  <manifest:file-entry manifest:full-path="Pictures/10000001000004B000000278595131FE.png" manifest:media-type="image/png"/>
  <manifest:file-entry manifest:full-path="Pictures/10000000000004B00000032031F17346.png" manifest:media-type="image/png"/>
  <manifest:file-entry manifest:full-path="Pictures/10000000000004B000000320AF3FD358.png" manifest:media-type="image/png"/>
  <manifest:file-entry manifest:full-path="Pictures/10000000000004B00000032011278627.png" manifest:media-type="image/png"/>
  <manifest:file-entry manifest:full-path="Pictures/10000000000002CE000001DE14C469B3.jpg" manifest:media-type="image/jpeg"/>
  <manifest:file-entry manifest:full-path="Pictures/100000000000071C000004007D1C2C0C.jpg" manifest:media-type="image/jpeg"/>
  <manifest:file-entry manifest:full-path="Pictures/100000000000071C0000040084A9A87B.jpg" manifest:media-type="image/jpeg"/>
  <manifest:file-entry manifest:full-path="Pictures/100000000000071C000004004C0C51B8.jpg" manifest:media-type="image/jpeg"/>
  <manifest:file-entry manifest:full-path="Pictures/100000000000071C0000040043AA69CC.jpg" manifest:media-type="image/jpeg"/>
  <manifest:file-entry manifest:full-path="Pictures/100000000000071C00000400DCAB540F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Bahnschrift SemiBold Condensed" svg:font-family="'Bahnschrift SemiBold Condensed'" style:font-family-generic="swiss" style:font-pitch="variable"/>
    <style:font-face style:name="Bahnschrift SemiBold Condensed1" svg:font-family="'Bahnschrift SemiBold Condensed'" style:font-adornments="SemiBold Condensed" style:font-family-generic="swiss" style:font-pitch="variable"/>
    <style:font-face style:name="Bernard MT Condensed" svg:font-family="'Bernard MT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solid" draw:fill-color="#5983b0" draw:textarea-horizontal-align="center" draw:textarea-vertical-align="middle" fo:min-height="1.713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center" fo:min-height="9.441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fo:min-height="12.077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3.801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13.751cm" loext:decorative="false"/>
      <style:paragraph-properties style:writing-mode="lr-tb"/>
    </style:style>
    <style:style style:name="pr1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5983b0"/>
      <style:paragraph-properties fo:text-align="center"/>
      <style:text-properties fo:color="#1c1c1c" loext:opacity="100%" style:text-outline="true" style:font-name="Bernard MT Condensed" fo:font-size="26pt" style:font-size-asian="26pt" style:font-size-complex="26pt"/>
    </style:style>
    <style:style style:name="P4" style:family="paragraph">
      <style:paragraph-properties fo:margin-top="0.42cm" fo:margin-bottom="0.35cm" fo:text-align="center"/>
    </style:style>
    <style:style style:name="P5" style:family="paragraph">
      <loext:graphic-properties draw:fill="none"/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5983b0"/>
      <style:paragraph-properties fo:text-align="center"/>
      <style:text-properties style:text-outline="false" style:font-name="Bernard MT Condensed" fo:font-size="26pt" style:font-size-asian="26pt" style:font-size-complex="26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 fo:text-align="left"/>
    </style:style>
    <style:style style:name="P10" style:family="paragraph">
      <loext:graphic-properties draw:fill="none"/>
      <style:paragraph-properties fo:margin-top="0.42cm" fo:margin-bottom="0.35cm"/>
      <style:text-properties style:text-outline="true" style:font-name="Bahnschrift SemiBold Condensed1" fo:font-size="24pt" fo:text-shadow="1pt 1pt" fo:font-weight="bold" style:font-size-asian="24pt" style:font-weight-asian="bold" style:font-size-complex="24pt" style:font-weight-complex="bold"/>
    </style:style>
    <style:style style:name="T1" style:family="text">
      <style:text-properties style:text-outline="false" style:font-name="Bernard MT Condensed" fo:font-size="28pt" style:font-size-asian="28pt" style:font-size-complex="28pt"/>
    </style:style>
    <style:style style:name="T2" style:family="text">
      <style:text-properties fo:color="#2a6099" loext:opacity="100%" style:text-outline="true" style:font-name="Bahnschrift SemiBold Condensed" fo:font-size="48pt" fo:text-shadow="1pt 1pt" fo:font-weight="bold" style:font-size-asian="48pt" style:font-weight-asian="bold" style:font-size-complex="48pt" style:font-weight-complex="bold"/>
    </style:style>
    <style:style style:name="T3" style:family="text">
      <style:text-properties fo:color="#2a6099" loext:opacity="100%" style:text-outline="true" style:font-name="Bahnschrift SemiBold Condensed" fo:font-size="32pt" fo:text-shadow="1pt 1pt" fo:font-weight="bold" style:font-size-asian="32pt" style:font-weight-asian="bold" style:font-size-complex="32pt" style:font-weight-complex="bold"/>
    </style:style>
    <style:style style:name="T4" style:family="text">
      <style:text-properties fo:color="#ff4000" loext:opacity="100%" style:text-outline="true" style:font-name="Bahnschrift SemiBold Condensed" fo:font-size="24pt" fo:text-shadow="1pt 1pt" style:font-size-asian="24pt" style:font-size-complex="24pt"/>
    </style:style>
    <style:style style:name="T5" style:family="text">
      <style:text-properties fo:color="#000000" loext:opacity="100%" style:text-outline="true" style:font-name="Bahnschrift SemiBold Condensed" fo:font-size="24pt" fo:text-shadow="1pt 1pt" style:font-size-asian="24pt" style:font-size-complex="24pt"/>
    </style:style>
    <style:style style:name="T6" style:family="text">
      <style:text-properties style:text-outline="true" style:font-name="Bahnschrift SemiBold Condensed" fo:font-size="24pt" fo:text-shadow="1pt 1pt" style:font-size-asian="24pt" style:font-size-complex="2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ff4000" loext:opacity="100%" style:text-outline="true" style:font-name="Bahnschrift SemiBold Condensed" fo:font-size="32pt" fo:text-shadow="1pt 1pt" style:font-size-asian="32pt" style:font-size-complex="32pt"/>
    </style:style>
    <style:style style:name="T9" style:family="text">
      <style:text-properties fo:color="#000000" loext:opacity="100%" style:text-outline="true" style:font-name="Bahnschrift SemiBold Condensed" fo:font-size="32pt" fo:text-shadow="1pt 1pt" style:font-size-asian="32pt" style:font-size-complex="32pt"/>
    </style:style>
    <style:style style:name="T10" style:family="text">
      <style:text-properties fo:color="#2a6099" loext:opacity="100%" style:text-outline="true" style:font-name="Bahnschrift SemiBold Condensed" fo:font-size="32pt" fo:text-shadow="1pt 1pt" style:font-size-asian="32pt" style:font-size-complex="32pt"/>
    </style:style>
    <style:style style:name="T11" style:family="text">
      <style:text-properties fo:color="#2a6099" loext:opacity="100%" style:text-outline="true" style:font-name="Bahnschrift SemiBold Condensed1" fo:font-size="32pt" fo:text-shadow="1pt 1pt" fo:font-weight="bold" style:font-size-asian="32pt" style:font-weight-asian="bold" style:font-size-complex="32pt" style:font-weight-complex="bold"/>
    </style:style>
    <style:style style:name="T12" style:family="text">
      <style:text-properties fo:color="#ff4000" loext:opacity="100%" style:text-outline="true" style:font-name="Bahnschrift SemiBold Condensed1" fo:font-size="24pt" fo:text-shadow="1pt 1pt" style:font-size-asian="24pt" style:font-size-complex="24pt"/>
    </style:style>
    <style:style style:name="T13" style:family="text">
      <style:text-properties style:text-outline="true" style:font-name="Bahnschrift SemiBold Condensed1" fo:font-size="24pt" fo:text-shadow="1pt 1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2cm" svg:height="15.749cm" svg:x="0.008cm" svg:y="0cm">
          <draw:image xlink:href="Pictures/100000000000071C00000400140FE161.jpg" xlink:type="simple" xlink:show="embed" xlink:actuate="onLoad" draw:mime-type="image/jpeg">
            <text:p/>
          </draw:image>
        </draw:frame>
        <draw:frame draw:style-name="gr2" draw:text-style-name="P3" draw:layer="layout" svg:width="28cm" svg:height="1.963cm" svg:x="0cm" svg:y="0.537cm">
          <draw:text-box>
            <text:p text:style-name="P2"><text:span text:style-name="T1">Operation Royal Alliance [SP / COOP] Dynamic Tasks [CUP - RACS]</text:span></text:p>
          </draw:text-box>
        </draw:frame>
        <draw:frame draw:style-name="gr1" draw:text-style-name="P1" draw:layer="layout" svg:width="3cm" svg:height="1.5cm" svg:x="0.5cm" svg:y="11cm">
          <draw:image xlink:href="Pictures/10000000000004B000000320A85818AB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1.5cm" svg:x="4cm" svg:y="7cm">
          <draw:image xlink:href="Pictures/10000001000004B0000002D0E582C81E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1.5cm" svg:x="4cm" svg:y="5cm">
          <draw:image xlink:href="Pictures/10000000000004B000000320D08B4306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1.5cm" svg:x="4cm" svg:y="3cm">
          <draw:image xlink:href="Pictures/10000000000004B0000003208301DD3D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1.5cm" svg:x="0.5cm" svg:y="9cm">
          <draw:image xlink:href="Pictures/10000000000004B0000002EE8C953A6B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1.5cm" svg:x="4cm" svg:y="9cm">
          <draw:image xlink:href="Pictures/10000000000004B000000320DAC30275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1.5cm" svg:x="0.5cm" svg:y="7cm">
          <draw:image xlink:href="Pictures/10000000000004B000000320244EB754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1.5cm" svg:x="0.5cm" svg:y="5cm">
          <draw:image xlink:href="Pictures/10000000000004B0000002583439BACA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1.5cm" svg:x="0.5cm" svg:y="3cm">
          <draw:image xlink:href="Pictures/10000001000004B000000278595131FE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1.5cm" svg:x="4cm" svg:y="13cm">
          <draw:image xlink:href="Pictures/10000000000004B00000032031F17346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1.5cm" svg:x="0.5cm" svg:y="13cm">
          <draw:image xlink:href="Pictures/10000000000004B000000320AF3FD358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1.5cm" svg:x="4cm" svg:y="11cm">
          <draw:image xlink:href="Pictures/10000000000004B00000032011278627.png" xlink:type="simple" xlink:show="embed" xlink:actuate="onLoad" draw:mime-type="image/png">
            <text:p/>
          </draw:image>
        </draw:frame>
        <draw:frame draw:style-name="gr1" draw:text-style-name="P1" draw:layer="layout" svg:width="6.45cm" svg:height="4.293cm" draw:transform="skewX (-0.000174532925199433) rotate (-0.00418879020478726) translate (21.017cm 5cm)">
          <draw:image xlink:href="Pictures/10000000000002CE000001DE14C469B3.jpg" xlink:type="simple" xlink:show="embed" xlink:actuate="onLoad" draw:mime-type="image/jpeg">
            <text:p/>
          </draw:image>
        </draw:frame>
        <draw:frame draw:style-name="gr3" draw:text-style-name="P5" draw:layer="layout" svg:width="7.5cm" svg:height="9.691cm" svg:x="20.5cm" svg:y="2.809cm">
          <draw:text-box>
            <text:p text:style-name="P4"><text:span text:style-name="T2">PORTO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27.992cm" svg:height="15.749cm" svg:x="0.008cm" svg:y="0.001cm">
          <draw:image xlink:href="Pictures/100000000000071C000004007D1C2C0C.jpg" xlink:type="simple" xlink:show="embed" xlink:actuate="onLoad" draw:mime-type="image/jpeg">
            <text:p/>
          </draw:image>
        </draw:frame>
        <draw:frame draw:style-name="gr2" draw:text-style-name="P7" draw:layer="layout" svg:width="28cm" svg:height="1.963cm" svg:x="0cm" svg:y="0.538cm">
          <draw:text-box>
            <text:p text:style-name="P2"><text:span text:style-name="T1">Operation Royal Alliance [SP / COOP] Dynamic Tasks [CUP - RACS]</text:span></text:p>
          </draw:text-box>
        </draw:frame>
        <draw:frame draw:style-name="gr5" draw:text-style-name="P5" draw:layer="layout" svg:width="26.5cm" svg:height="12.331cm" svg:x="0.5cm" svg:y="2.567cm">
          <draw:text-box>
            <text:p text:style-name="P8"><text:span text:style-name="T3">Support Options</text:span></text:p>
            <text:p text:style-name="P9"><text:span text:style-name="T4">MQ-9 Reaper Drone </text:span><text:span text:style-name="T5">: </text:span><text:span text:style-name="T5"><text:tab/></text:span><text:span text:style-name="T6"><text:tab/></text:span><text:span text:style-name="T6"><text:tab/></text:span><text:span text:style-name="T6"><text:tab/></text:span><text:span text:style-name="T6">15-minute aerial surveillance that marks allies </text:span></text:p>
            <text:p text:style-name="P9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(blue) and enemies (red) on the map </text:span></text:p>
            <text:p text:style-name="P9"><text:span text:style-name="T4">CH-47F Chinook Helicopter </text:span><text:span text:style-name="T6">:</text:span></text:p>
            <text:p text:style-name="P9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Ammo resupply</text:span></text:p>
            <text:p text:style-name="P9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Vehicle replacement delivery (one-time use).</text:span></text:p>
            <text:p text:style-name="P9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Close Air Support (CAS) strike. with a 5-minute cooldown. </text:span></text:p>
            <text:p text:style-name="P9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Squad reinforcements deployment.</text:span></text:p>
            <text:p text:style-name="P9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Emergency team extraction.</text:span></text:p>
            <text:p text:style-name="P9"><text:span text:style-name="T7"/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27.992cm" svg:height="15.749cm" svg:x="0cm" svg:y="0cm">
          <draw:image xlink:href="Pictures/100000000000071C0000040084A9A87B.jpg" xlink:type="simple" xlink:show="embed" xlink:actuate="onLoad" draw:mime-type="image/jpeg">
            <text:p/>
          </draw:image>
        </draw:frame>
        <draw:frame draw:style-name="gr2" draw:text-style-name="P7" draw:layer="layout" svg:width="28cm" svg:height="1.963cm" svg:x="0cm" svg:y="0.538cm">
          <draw:text-box>
            <text:p text:style-name="P2"><text:span text:style-name="T1">Operation Royal Alliance [SP / COOP] Dynamic Tasks [CUP - RACS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1" draw:layer="layout" svg:width="27.992cm" svg:height="15.749cm" svg:x="0cm" svg:y="0cm">
          <draw:image xlink:href="Pictures/100000000000071C000004004C0C51B8.jpg" xlink:type="simple" xlink:show="embed" xlink:actuate="onLoad" draw:mime-type="image/jpeg">
            <text:p/>
          </draw:image>
        </draw:frame>
        <draw:frame draw:style-name="gr2" draw:text-style-name="P7" draw:layer="layout" svg:width="28cm" svg:height="1.963cm" svg:x="0cm" svg:y="0.538cm">
          <draw:text-box>
            <text:p text:style-name="P2"><text:span text:style-name="T1">Operation Royal Alliance [SP / COOP] Dynamic Tasks [CUP - RACS]</text:span></text:p>
          </draw:text-box>
        </draw:frame>
        <draw:frame draw:style-name="gr6" draw:text-style-name="P5" draw:layer="layout" svg:width="19.5cm" svg:height="14.067cm" svg:x="0.5cm" svg:y="2.567cm">
          <draw:text-box>
            <text:p text:style-name="P8"><text:span text:style-name="T3">Mechanics &amp; Immersion</text:span></text:p>
            <text:p text:style-name="P9"><text:span text:style-name="T8">T</text:span><text:span text:style-name="T4">eam Switch on Death</text:span><text:span text:style-name="T5"> : If you die, you instantly take control of a surviving AI soldier in your squad.</text:span></text:p>
            <text:p text:style-name="P9"><text:span text:style-name="T4">Dynamic Leadership</text:span><text:span text:style-name="T5"> : If the squad leader is killed, command automatically transfers to the next living human player.</text:span></text:p>
            <text:p text:style-name="P9"><text:span text:style-name="T4">Randomized Identities</text:span><text:span text:style-name="T5"> : Every soldier gets a random name, face, voice, and gear setup (uniforms, vests, helmets) at startup.</text:span></text:p>
            <text:p text:style-name="P9"><text:span text:style-name="T4">Procedural Civilians</text:span><text:span text:style-name="T5"> : Ambient civilians populate the area and react to the environment (collateral damage must be avoided).</text:span></text:p>
            <text:p text:style-name="P9"><text:span text:style-name="T4">Chained Task System </text:span><text:span text:style-name="T5">: The mission progresses through a series of connected, randomized objectives from insertion to completion</text:span><text:span text:style-name="T9">.</text:span></text:p>
            <text:p text:style-name="P9"><text:span text:style-name="T10"/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1" draw:layer="layout" svg:width="27.992cm" svg:height="15.749cm" svg:x="0.008cm" svg:y="0.001cm">
          <draw:image xlink:href="Pictures/100000000000071C0000040043AA69CC.jpg" xlink:type="simple" xlink:show="embed" xlink:actuate="onLoad" draw:mime-type="image/jpeg">
            <text:p/>
          </draw:image>
        </draw:frame>
        <draw:frame draw:style-name="gr2" draw:text-style-name="P7" draw:layer="layout" svg:width="28cm" svg:height="1.963cm" svg:x="0cm" svg:y="0.539cm">
          <draw:text-box>
            <text:p text:style-name="P2"><text:span text:style-name="T1">Operation Royal Alliance [SP / COOP] Dynamic Tasks [CUP - RACS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1" draw:text-style-name="P1" draw:layer="layout" svg:width="27.992cm" svg:height="15.749cm" svg:x="0.008cm" svg:y="0.001cm">
          <draw:image xlink:href="Pictures/100000000000071C00000400DCAB540F.jpg" xlink:type="simple" xlink:show="embed" xlink:actuate="onLoad" draw:mime-type="image/jpeg">
            <text:p/>
          </draw:image>
        </draw:frame>
        <draw:frame draw:style-name="gr2" draw:text-style-name="P7" draw:layer="layout" svg:width="28cm" svg:height="1.963cm" svg:x="0cm" svg:y="0.54cm">
          <draw:text-box>
            <text:p text:style-name="P2"><text:span text:style-name="T1">Operation Royal Alliance [SP / COOP] Dynamic Tasks [CUP - RACS]</text:span></text:p>
          </draw:text-box>
        </draw:frame>
        <draw:frame draw:style-name="gr7" draw:text-style-name="P10" draw:layer="layout" svg:width="19.203cm" svg:height="14.001cm" svg:x="0.797cm" svg:y="2.999cm">
          <draw:text-box>
            <text:p text:style-name="P8"><text:span text:style-name="T11">Squad Command (AI)</text:span></text:p>
            <text:p text:style-name="P9"><text:span text:style-name="T12">4 Rules of Engagement (RoE)</text:span><text:span text:style-name="T13"> : Infiltration (stealth), Vigilance (default), Assault (offensive), and Charge (full sprint).</text:span></text:p>
            <text:p text:style-name="P9"><text:span text:style-name="T12">Smart Healing</text:span><text:span text:style-name="T13"> : Order wounded AI units to patch themselves up if they have a medical kit.</text:span></text:p>
            <text:p text:style-name="P9"><text:span text:style-name="T12">Building Search</text:span><text:span text:style-name="T13"> : Order AI units to clear and secure nearby building interiors within a 50m radius for 3 minutes.</text:span></text:p>
            <text:p text:style-name="P9"><text:span text:style-name="T12">Instant Regroup </text:span><text:span text:style-name="T13">: Recall all scattered AI units to the leader's position immediately.</text:span></text:p>
            <text:p text:style-name="P9"><text:span text:style-name="T13"/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draw:style-name="gr1" draw:text-style-name="P1" draw:layer="layout" svg:width="27.992cm" svg:height="15.749cm" svg:x="0.008cm" svg:y="0cm">
          <draw:image xlink:href="Pictures/100000000000071C00000400140FE161.jpg" xlink:type="simple" xlink:show="embed" xlink:actuate="onLoad" draw:mime-type="image/jpeg">
            <text:p/>
          </draw:image>
        </draw:frame>
        <draw:frame draw:style-name="gr2" draw:text-style-name="P3" draw:layer="layout" svg:width="28cm" svg:height="1.963cm" svg:x="0cm" svg:y="0.537cm">
          <draw:text-box>
            <text:p text:style-name="P2"><text:span text:style-name="T1">Operation Royal Alliance [SP / COOP] Dynamic Tasks [CUP - RACS]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Bahnschrift SemiBold Condensed" svg:font-family="'Bahnschrift SemiBold Condensed'" style:font-family-generic="swiss" style:font-pitch="variable"/>
    <style:font-face style:name="Bahnschrift SemiBold Condensed1" svg:font-family="'Bahnschrift SemiBold Condensed'" style:font-adornments="SemiBold Condensed" style:font-family-generic="swiss" style:font-pitch="variable"/>
    <style:font-face style:name="Bernard MT Condensed" svg:font-family="'Bernard MT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5-24T16:39:43.821142600</meta:creation-date>
    <dc:date>2026-05-24T23:18:58.384676300</dc:date>
    <meta:editing-duration>PT18M14S</meta:editing-duration>
    <meta:editing-cycles>3</meta:editing-cycles>
    <meta:generator>LibreOffice/26.2.3.2$Windows_X86_64 LibreOffice_project/70e089b17412e4cb7773e41413306b17a2328c34</meta:generator>
    <meta:document-statistic meta:object-count="66"/>
  </office:meta>
</office:document-meta>
</file>